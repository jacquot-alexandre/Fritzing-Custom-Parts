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E000001EEF00C0BF0.png" manifest:media-type="image/png"/>
  <manifest:file-entry manifest:full-path="Pictures/1000000000000243000000F73C08BBBD.png" manifest:media-type="image/png"/>
  <manifest:file-entry manifest:full-path="Pictures/1000000000000218000000C04AA18539.png" manifest:media-type="image/png"/>
  <manifest:file-entry manifest:full-path="Pictures/1000000000000163000000DC682A2AF4.png" manifest:media-type="image/png"/>
  <manifest:file-entry manifest:full-path="Pictures/1000000000000167000000C22B02A70F.png" manifest:media-type="image/png"/>
  <manifest:file-entry manifest:full-path="Pictures/10000000000001A2000000D033E5B1C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cfbc" officeooo:paragraph-rsid="001ccfbc"/>
    </style:style>
    <style:style style:name="P2" style:family="paragraph" style:parent-style-name="Standard">
      <style:text-properties officeooo:rsid="001ccfbc" officeooo:paragraph-rsid="0020eb45"/>
    </style:style>
    <style:style style:name="T1" style:family="text">
      <style:text-properties officeooo:rsid="0020eb45"/>
    </style:style>
    <style:style style:name="T2" style:family="text">
      <style:text-properties officeooo:rsid="001d9b65"/>
    </style:style>
    <style:style style:name="T3" style:family="text">
      <style:text-properties officeooo:rsid="001e7ee5"/>
    </style:style>
    <style:style style:name="T4" style:family="text">
      <style:text-properties officeooo:rsid="001ff31a"/>
    </style:style>
    <style:style style:name="T5" style:family="text">
      <style:text-properties officeooo:rsid="002172e9"/>
    </style:style>
    <style:style style:name="T6" style:family="text">
      <style:text-properties officeooo:rsid="002425f4"/>
    </style:style>
    <style:style style:name="T7" style:family="text">
      <style:text-properties officeooo:rsid="0024445d"/>
    </style:style>
    <style:style style:name="T8" style:family="text">
      <style:text-properties officeooo:rsid="0027e43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part seems to be saved in<text:line-break/><text:line-break/>C:\Users\Ich\Documents\Fritzing\parts\user</text:p>
      <text:p text:style-name="P1"/>
      <text:p text:style-name="P1">in file with following extension: fzp</text:p>
      <text:p text:style-name="P1"/>
      <text:p text:style-name="P1">The index of my part is located in<text:line-break/><text:line-break/>C:\Users\Ich\Documents\Fritzing\bins\my_parts.fzb</text:p>
      <text:p text:style-name="P1"/>
      <text:p text:style-name="P2">my_parts.fzb is a simple xml file containing the list of my parts</text:p>
      <text:p text:style-name="P2"/>
      <text:p text:style-name="P2"><text:span text:style-name="T1">it is update when we saved the part collection<text:line-break/></text:span><draw:frame draw:style-name="fr1" draw:name="Bild3" text:anchor-type="char" svg:x="1.4882in" svg:y="0.2417in" svg:width="3.7165in" svg:height="4.1165in" draw:z-index="2"><draw:image xlink:href="Pictures/10000000000001BE000001EEF00C0BF0.png" xlink:type="simple" xlink:show="embed" xlink:actuate="onLoad" draw:mime-type="image/png"/></draw:frame></text:p>
      <text:p text:style-name="P1"/>
      <text:p text:style-name="P1">The fzp file is also a xml file <text:span text:style-name="T2">that define where the svg can be found.<text:line-break/><text:line-break/>Svg are loaded from<text:line-break/><text:line-break/></text:span><draw:frame draw:style-name="fr1" draw:name="Bild1" text:anchor-type="char" svg:x="0.1382in" svg:y="0.8335in" svg:width="4.4665in" svg:height="1.6in" draw:z-index="0"><draw:image xlink:href="Pictures/1000000000000218000000C04AA18539.png" xlink:type="simple" xlink:show="embed" xlink:actuate="onLoad" draw:mime-type="image/png"/></draw:frame></text:p>
      <text:p text:style-name="P1"><text:span text:style-name="T3">When the user open a zipped part like<text:line-break/><text:line-break/></text:span><text:soft-page-break/><text:span text:style-name="T3">XT30PW-M.fzpz<text:line-break/><text:line-break/>typically used as model for own custom part. As soon as the </text:span><text:span text:style-name="T4">archive parted is open,</text:span></text:p>
      <text:p text:style-name="P1"/>
      <text:p text:style-name="Text_20_body">the fzp file and svgs are created in their specific folders<text:line-break/><text:line-break/>archived that has been opened in Fritzing<text:line-break/><text:line-break/><draw:frame draw:style-name="fr1" draw:name="Bild2" text:anchor-type="char" svg:x="0.0673in" svg:y="0.7165in" svg:width="4.8252in" svg:height="2.0583in" draw:z-index="1"><draw:image xlink:href="Pictures/1000000000000243000000F73C08BBBD.png" xlink:type="simple" xlink:show="embed" xlink:actuate="onLoad" draw:mime-type="image/png"/></draw:frame><text:line-break/><text:line-break/><text:span text:style-name="T5">Example of female header<text:line-break/><text:line-break/></text:span><draw:frame draw:style-name="fr1" draw:name="Bild5" text:anchor-type="char" svg:x="-0.0661in" svg:y="4.2in" svg:width="2.9583in" svg:height="1.8335in" draw:z-index="4"><draw:image xlink:href="Pictures/1000000000000163000000DC682A2AF4.png" xlink:type="simple" xlink:show="embed" xlink:actuate="onLoad" draw:mime-type="image/png"/></draw:frame><text:span text:style-name="T5"><text:line-break/></text:span><draw:frame draw:style-name="fr2" draw:name="Bild4" text:anchor-type="char" svg:width="2.9583in" svg:height="1.8335in" draw:z-index="3"><draw:image xlink:href="Pictures/1000000000000163000000DC682A2AF4.png" xlink:type="simple" xlink:show="embed" xlink:actuate="onLoad" draw:mime-type="image/png"/></draw:frame><text:span text:style-name="T5">Example of male header<text:line-break/><text:line-break/></text:span><draw:frame draw:style-name="fr1" draw:name="Bild6" text:anchor-type="char" svg:x="-0.0575in" svg:y="6.6083in" svg:width="2.9917in" svg:height="1.6165in" draw:z-index="5"><draw:image xlink:href="Pictures/1000000000000167000000C22B02A70F.png" xlink:type="simple" xlink:show="embed" xlink:actuate="onLoad" draw:mime-type="image/png"/></draw:frame><text:span text:style-name="T5"><text:line-break/><text:line-break/></text:span><text:span text:style-name="T6">Note from (</text:span><text:a xlink:type="simple" xlink:href="https://fritzing.org/fritzings-graphic-standards/" text:style-name="Internet_20_link" text:visited-style-name="Visited_20_Internet_20_Link">Fritzing's Graphic Standards</text:a><text:span text:style-name="T6">)</text:span></text:p>
      <text:p text:style-name="Text_20_body"><text:soft-page-break/>D:\Fujitsu_Lifebook_2026\77_Joy-it_Buckboost01_Fritzing\Input\FontsAndTemplates</text:p>
      <text:p text:style-name="Text_20_body"><text:line-break/><text:span text:style-name="T6">install the OCR A font (right click , and install in system)<text:line-break/><text:line-break/>The Text must use OCR A font but must be converted to Path and the SVG must be saved as plan-SVG (not inkscape SVG)<text:line-break/><text:line-break/></text:span><text:span text:style-name="T7">Arrow must be draw as path (do not use arrow end).<text:line-break/><text:line-break/></text:span><text:span text:style-name="T8">The xml in *.fzp may contains a bus tag that connect pin internally together. This connection could have been necessary for the base part, but those internal connection maybe unnecessary for the derived part.<text:line-break/><text:line-break/></text:span><draw:frame draw:style-name="fr1" draw:name="Bild7" text:anchor-type="char" svg:x="0.1591in" svg:y="2.6772in" svg:width="4.3543in" svg:height="2.1665in" draw:z-index="6"><draw:image xlink:href="Pictures/10000000000001A2000000D033E5B1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6T16:13:47.362618300</meta:creation-date>
    <dc:date>2026-07-18T13:06:15.464534500</dc:date>
    <meta:editing-duration>PT3H36M38S</meta:editing-duration>
    <meta:editing-cycles>12</meta:editing-cycles>
    <meta:generator>LibreOffice/26.2.3.2$Windows_X86_64 LibreOffice_project/70e089b17412e4cb7773e41413306b17a2328c34</meta:generator>
    <meta:document-statistic meta:table-count="0" meta:image-count="7" meta:object-count="0" meta:page-count="3" meta:paragraph-count="10" meta:word-count="202" meta:character-count="1257" meta:non-whitespace-character-count="1042"/>
  </office:meta>
</office:document-meta>
</file>